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1"/>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4"/>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5"/>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list-style-name="L6"/>
    <style:style style:name="P13" style:family="paragraph" style:parent-style-name="Text_20_body" style:list-style-name="L7">
      <style:paragraph-properties fo:margin-top="0cm" fo:margin-bottom="0cm" style:contextual-spacing="false"/>
    </style:style>
    <style:style style:name="P14" style:family="paragraph" style:parent-style-name="Text_20_body" style:list-style-name="L7"/>
    <style:style style:name="P15" style:family="paragraph" style:parent-style-name="Text_20_body" style:list-style-name="L8">
      <style:paragraph-properties fo:margin-top="0cm" fo:margin-bottom="0cm" style:contextual-spacing="false"/>
    </style:style>
    <style:style style:name="P16" style:family="paragraph" style:parent-style-name="Text_20_body" style:list-style-name="L8"/>
    <style:style style:name="P17" style:family="paragraph" style:parent-style-name="Text_20_body" style:list-style-name="L9">
      <style:paragraph-properties fo:margin-top="0cm" fo:margin-bottom="0cm" style:contextual-spacing="false"/>
    </style:style>
    <style:style style:name="P18" style:family="paragraph" style:parent-style-name="Text_20_body" style:list-style-name="L9"/>
    <style:style style:name="P19" style:family="paragraph" style:parent-style-name="Text_20_body" style:list-style-name="L10">
      <style:paragraph-properties fo:margin-top="0cm" fo:margin-bottom="0cm" style:contextual-spacing="false"/>
    </style:style>
    <style:style style:name="P20" style:family="paragraph" style:parent-style-name="Text_20_body" style:list-style-name="L10"/>
    <style:style style:name="P21" style:family="paragraph" style:parent-style-name="Text_20_body" style:list-style-name="L11">
      <style:paragraph-properties fo:margin-top="0cm" fo:margin-bottom="0cm" style:contextual-spacing="false"/>
    </style:style>
    <style:style style:name="P22" style:family="paragraph" style:parent-style-name="Text_20_body" style:list-style-name="L11"/>
    <style:style style:name="P23" style:family="paragraph" style:parent-style-name="Text_20_body" style:list-style-name="L12">
      <style:paragraph-properties fo:margin-top="0cm" fo:margin-bottom="0cm" style:contextual-spacing="false"/>
    </style:style>
    <style:style style:name="P24" style:family="paragraph" style:parent-style-name="Text_20_body" style:list-style-name="L12"/>
    <style:style style:name="P25" style:family="paragraph" style:parent-style-name="Horizontal_20_Line">
      <style:paragraph-properties fo:margin-top="0cm" fo:margin-bottom="0.247cm" style:contextual-spacing="false" fo:line-height="115%"/>
    </style:style>
    <style:style style:name="P26" style:family="paragraph" style:parent-style-name="Heading_20_1">
      <style:paragraph-properties fo:margin-top="0cm" fo:margin-bottom="0.247cm" style:contextual-spacing="false" fo:line-height="115%"/>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uía completa de instalación: SimHubDash + CrewChief para Le Mans Ultimate en Linux (CachyOS + KDE Plasma)</text:h>
      <text:p text:style-name="Text_20_body">Esta guía explica cómo instalar y configurar Le Mans Ultimate, SimHubDash y CrewChief en Linux utilizando Wayland, con una configuración de tres monitores de <text:span text:style-name="Strong_20_Emphasis">7680×1440 a 144 Hz</text:span>, sin utilizar Gamescope.</text:p>
      <text:p text:style-name="Text_20_body"><text:span text:style-name="Strong_20_Emphasis">Nota:</text:span> La resolución y la frecuencia de actualización de los monitores pueden adaptarse a la configuración de tu equipo.</text:p>
      <text:p text:style-name="Horizontal_20_Line"/>
      <text:h text:style-name="Heading_20_1" text:outline-level="1">Instalación de Le Mans Ultimate, SimHubDash y CrewChief</text:h>
      <text:h text:style-name="Heading_20_2" text:outline-level="2">1. Instalar Le Mans Ultimate</text:h>
      <text:p text:style-name="Text_20_body">Instala Le Mans Ultimate desde Steam y ejecútalo utilizando la versión de Proton recomendada para la versión actual del juego.</text:p>
      <text:p text:style-name="Text_20_body">Antes de continuar:</text:p>
      <text:list text:style-name="L1">
        <text:list-item>
          <text:p text:style-name="P1">Utiliza únicamente un monitor para la configuración inicial (puedes tener más monitores conectados, pero no intentes configurar la triple pantalla todavía). </text:p>
        </text:list-item>
        <text:list-item>
          <text:p text:style-name="P1">Configura el volante, los pedales, la asignación de botones y el resto de los controles. </text:p>
        </text:list-item>
        <text:list-item>
          <text:p text:style-name="P1">Cierra el simulador cuando hayas terminado de configurarlo. </text:p>
        </text:list-item>
        <text:list-item>
          <text:p text:style-name="P2">Deja las <text:span text:style-name="Strong_20_Emphasis">Opciones de lanzamiento de Steam</text:span> completamente vacías por ahora. </text:p>
        </text:list-item>
      </text:list>
      <text:p text:style-name="Horizontal_20_Line"/>
      <text:h text:style-name="Heading_20_2" text:outline-level="2">2. Descargar las últimas versiones</text:h>
      <text:p text:style-name="Text_20_body">Descarga las versiones más recientes de:</text:p>
      <text:list text:style-name="L2">
        <text:list-item>
          <text:p text:style-name="P3">SimHubDash </text:p>
        </text:list-item>
        <text:list-item>
          <text:p text:style-name="P4">CrewChief </text:p>
        </text:list-item>
      </text:list>
      <text:p text:style-name="Horizontal_20_Line"/>
      <text:h text:style-name="Heading_20_2" text:outline-level="2">3. Abrir una terminal</text:h>
      <text:p text:style-name="Text_20_body">Accede a la carpeta donde descargaste los instaladores.</text:p>
      <text:p text:style-name="Horizontal_20_Line"/>
      <text:h text:style-name="Heading_20_2" text:outline-level="2"><text:soft-page-break/>4. Instalar SimHubDash y CrewChief</text:h>
      <text:p text:style-name="Text_20_body">Ejecuta los comandos incluidos en <text:span text:style-name="Strong_20_Emphasis">Install_Simhubdash_and_Crewchief.txt</text:span>.</text:p>
      <text:p text:style-name="Text_20_body"><text:span text:style-name="Strong_20_Emphasis">Importante:</text:span> Actualiza la ruta y la versión de Proton, así como los nombres de los instaladores de SimHubDash y CrewChief, para que coincidan con las versiones que estés utilizando.</text:p>
      <text:p text:style-name="Horizontal_20_Line"/>
      <text:h text:style-name="Heading_20_2" text:outline-level="2">5. Crear el script de inicio</text:h>
      <text:p text:style-name="Text_20_body">Crea un script llamado <text:span text:style-name="Strong_20_Emphasis">xxxx.sh</text:span> utilizando el contenido de <text:span text:style-name="Strong_20_Emphasis">Launch_Simhub_And_Crewchief.txt</text:span>.</text:p>
      <text:p text:style-name="Text_20_body">Guárdalo donde prefieras y dale permisos de ejecución.</text:p>
      <text:p text:style-name="Text_20_body">Recuerda actualizar la ruta de Proton si es necesario.</text:p>
      <text:p text:style-name="Horizontal_20_Line"/>
      <text:h text:style-name="Heading_20_2" text:outline-level="2">6. Iniciar SimHubDash y CrewChief</text:h>
      <text:p text:style-name="Text_20_body">Ejecuta <text:span text:style-name="Strong_20_Emphasis">xxxx.sh</text:span>.</text:p>
      <text:p text:style-name="Text_20_body">Las dos aplicaciones deberían iniciarse correctamente.</text:p>
      <text:p text:style-name="Text_20_body">Configura los <text:span text:style-name="Strong_20_Emphasis">plugins de telemetría</text:span> en cada una de ellas.</text:p>
      <text:p text:style-name="Text_20_body">Si alguna de las aplicaciones no detecta o no permite configurar la telemetría, ciérralas ambas.</text:p>
      <text:p text:style-name="Horizontal_20_Line"/>
      <text:h text:style-name="Heading_20_2" text:outline-level="2">6b. Si la telemetría sigue sin funcionar</text:h>
      <text:p text:style-name="Text_20_body">Con ambas aplicaciones cerradas:</text:p>
      <text:list text:style-name="L3">
        <text:list-item>
          <text:p text:style-name="P5">Inicia Le Mans Ultimate desde Steam. </text:p>
        </text:list-item>
        <text:list-item>
          <text:p text:style-name="P5">Cuando el simulador esté en funcionamiento, ejecuta <text:span text:style-name="Strong_20_Emphasis">xxxx.sh</text:span>. </text:p>
        </text:list-item>
        <text:list-item>
          <text:p text:style-name="P6">Configura de nuevo los <text:span text:style-name="Strong_20_Emphasis">plugins de telemetría</text:span> en SimHubDash y CrewChief. </text:p>
        </text:list-item>
      </text:list>
      <text:p text:style-name="Text_20_body">Una vez que la telemetría funcione correctamente, cierra todo siguiendo este orden:</text:p>
      <text:list text:style-name="L4">
        <text:list-item>
          <text:p text:style-name="P7">Cierra SimHubDash y CrewChief. </text:p>
        </text:list-item>
        <text:list-item>
          <text:p text:style-name="P8">Cierra Le Mans Ultimate. </text:p>
        </text:list-item>
      </text:list>
      <text:p text:style-name="Text_20_body"><text:span text:style-name="Strong_20_Emphasis">Nota:</text:span> La activación de la telemetría puede resultar algo inconsistente. En mi experiencia, normalmente funciona con el simulador cerrado (Paso 6), aunque en algunas ocasiones solo se activa cuando LMU ya está en ejecución (Paso 6b). Si no funciona al primer intento, vuelve a intentarlo; tarde o temprano terminará conectando correctamente.</text:p>
      <text:p text:style-name="Horizontal_20_Line"/>
      <text:h text:style-name="Heading_20_2" text:outline-level="2">7. Permitir SimHubDash en el cortafuegos</text:h>
      <text:p text:style-name="Text_20_body">Para que SimHubDash pueda comunicarse con tablets y dispositivos móviles, abre el puerto <text:span text:style-name="Strong_20_Emphasis">TCP 8888</text:span> en el cortafuegos.</text:p>
      <text:p text:style-name="Text_20_body"><text:soft-page-break/>En KDE Plasma, la configuración del cortafuegos está disponible directamente desde <text:span text:style-name="Strong_20_Emphasis">Configuración del sistema</text:span>.</text:p>
      <text:p text:style-name="Horizontal_20_Line"/>
      <text:h text:style-name="Heading_20_2" text:outline-level="2">8. Comprobar que todo funciona correctamente</text:h>
      <text:p text:style-name="Text_20_body">Procura iniciar y cerrar siempre las aplicaciones siguiendo el mismo orden.</text:p>
      <text:h text:style-name="Heading_20_3" text:outline-level="3">Inicio</text:h>
      <text:list text:style-name="L5">
        <text:list-item>
          <text:p text:style-name="P9">Inicia Le Mans Ultimate desde Steam. </text:p>
        </text:list-item>
        <text:list-item>
          <text:p text:style-name="P10">Ejecuta el script de inicio. </text:p>
        </text:list-item>
      </text:list>
      <text:h text:style-name="Heading_20_3" text:outline-level="3">Cierre</text:h>
      <text:list text:style-name="L6">
        <text:list-item>
          <text:p text:style-name="P11">Cierra SimHubDash y CrewChief (el orden entre ambas aplicaciones es indiferente). </text:p>
        </text:list-item>
        <text:list-item>
          <text:p text:style-name="P12">Cierra Le Mans Ultimate. </text:p>
        </text:list-item>
      </text:list>
      <text:p text:style-name="Horizontal_20_Line"/>
      <text:h text:style-name="Heading_20_2" text:outline-level="2">9. Usuarios con un solo monitor</text:h>
      <text:p text:style-name="Text_20_body">Si utilizas un único monitor, ya puedes pasar directamente a la sección <text:span text:style-name="Strong_20_Emphasis">Opciones de lanzamiento de Steam</text:span>.</text:p>
      <text:p text:style-name="Horizontal_20_Line"/>
      <text:h text:style-name="Heading_20_1" text:outline-level="1">Notas</text:h>
      <text:p text:style-name="Text_20_body">Según mi experiencia:</text:p>
      <text:list text:style-name="L7">
        <text:list-item>
          <text:p text:style-name="P13">CrewChief funciona correctamente, excepto los comandos de voz y la opción para que el programa se dirija a ti por tu nombre. </text:p>
        </text:list-item>
        <text:list-item>
          <text:p text:style-name="P13">SimHubDash funciona correctamente para dashboards, overlays, telemetría y el resto de pantallas de información. </text:p>
        </text:list-item>
        <text:list-item>
          <text:p text:style-name="P14">El sistema háptico <text:span text:style-name="Strong_20_Emphasis">Next Level Racing HF8</text:span> también funciona, pero debe configurarse como un dispositivo de salida de audio dentro de <text:span text:style-name="Strong_20_Emphasis">ShakeIt Bass Shakers</text:span>. No he conseguido hacerlo funcionar mediante USB.</text:p>
        </text:list-item>
      </text:list>
      <text:p text:style-name="Standard"/>
      <text:p text:style-name="Standard"/>
      <text:p text:style-name="Standard"/>
      <text:h text:style-name="Heading_20_1" text:outline-level="1">Configuración para tres monitores (Wayland, sin Gamescope)</text:h>
      <text:h text:style-name="Heading_20_2" text:outline-level="2">1. Descargar Config_DX11.txt</text:h>
      <text:p text:style-name="Horizontal_20_Line"/>
      <text:h text:style-name="Heading_20_2" text:outline-level="2"><text:soft-page-break/>2. Editar el archivo de configuración</text:h>
      <text:p text:style-name="Text_20_body">Ve a:</text:p>
      <text:p text:style-name="Text_20_body"><text:span text:style-name="Source_20_Text">/home/TU_USUARIO/.steam/steam/steamapps/common/Le Mans Ultimate/UserData/</text:span></text:p>
      <text:p text:style-name="Text_20_body">Abre <text:span text:style-name="Strong_20_Emphasis">Config_DX11.ini</text:span>, sustituye todo su contenido por el de <text:span text:style-name="Strong_20_Emphasis">Config_DX11.txt</text:span> y guarda el archivo.</text:p>
      <text:p text:style-name="Text_20_body">Si tu configuración no es de <text:span text:style-name="Strong_20_Emphasis">7680×1440</text:span>, modifica únicamente los valores de resolución.</text:p>
      <text:p text:style-name="Text_20_body">Por ahora, deja el resto de opciones sin cambios.</text:p>
      <text:p text:style-name="Horizontal_20_Line"/>
      <text:h text:style-name="Heading_20_2" text:outline-level="2">3. Configurar LMU</text:h>
      <text:p text:style-name="Text_20_body">Inicia Le Mans Ultimate.</text:p>
      <text:p text:style-name="Text_20_body">Configura únicamente:</text:p>
      <text:list text:style-name="L8">
        <text:list-item>
          <text:p text:style-name="P15">Resolución de pantalla. </text:p>
        </text:list-item>
        <text:list-item>
          <text:p text:style-name="P16">Activar <text:span text:style-name="Strong_20_Emphasis">Multiview</text:span>. </text:p>
        </text:list-item>
      </text:list>
      <text:p text:style-name="Text_20_body">Reinicia el simulador.</text:p>
      <text:p text:style-name="Horizontal_20_Line"/>
      <text:h text:style-name="Heading_20_2" text:outline-level="2">4. Comprobar la imagen</text:h>
      <text:p text:style-name="Text_20_body">Si LMU se extiende correctamente por los tres monitores, continúa con el <text:span text:style-name="Strong_20_Emphasis">Paso 6</text:span>.</text:p>
      <text:p text:style-name="Horizontal_20_Line"/>
      <text:h text:style-name="Heading_20_2" text:outline-level="2">4b. Si LMU solo ocupa dos monitores</text:h>
      <text:p text:style-name="Text_20_body">Continúa con el <text:span text:style-name="Strong_20_Emphasis">Paso 5</text:span>.</text:p>
      <text:p text:style-name="Horizontal_20_Line"/>
      <text:h text:style-name="Heading_20_2" text:outline-level="2">5. Crear una regla de ventana en KDE Plasma</text:h>
      <text:p text:style-name="Text_20_body">Con LMU en funcionamiento:</text:p>
      <text:list text:style-name="L9">
        <text:list-item>
          <text:p text:style-name="P17">Abre <text:span text:style-name="Strong_20_Emphasis">Configuración del sistema → Gestión de ventanas → Reglas de ventanas</text:span>. </text:p>
        </text:list-item>
        <text:list-item>
          <text:p text:style-name="P17">Crea una nueva regla. </text:p>
        </text:list-item>
        <text:list-item>
          <text:p text:style-name="P17">Selecciona la ventana de LMU. </text:p>
        </text:list-item>
        <text:list-item>
          <text:p text:style-name="P18">Configúrala utilizando los parámetros mostrados en la imagen <text:span text:style-name="Strong_20_Emphasis">window_rule.png</text:span>. </text:p>
        </text:list-item>
      </text:list>
      <text:p text:style-name="Text_20_body"><text:span text:style-name="Strong_20_Emphasis">Nota:</text:span> La posición de la ventana puede variar respecto al ejemplo. En mi caso está configurada en <text:span text:style-name="Strong_20_Emphasis">0,1080</text:span> porque tengo un cuarto monitor situado encima del conjunto de tres pantallas. Según tu configuración, el valor puede ser <text:span text:style-name="Strong_20_Emphasis">0,0</text:span> u otro distinto.</text:p>
      <text:p text:style-name="Text_20_body">Aplica los cambios.</text:p>
      <text:p text:style-name="Text_20_body"><text:soft-page-break/>Cierra LMU y vuelve a iniciarlo.</text:p>
      <text:p text:style-name="Text_20_body">Ahora debería extenderse correctamente por los tres monitores.</text:p>
      <text:p text:style-name="Horizontal_20_Line"/>
      <text:h text:style-name="Heading_20_2" text:outline-level="2">6. Ajustar la vista dentro del juego</text:h>
      <text:p text:style-name="Text_20_body">Entra en una sesión y ajusta:</text:p>
      <text:list text:style-name="L10">
        <text:list-item>
          <text:p text:style-name="P19">La alineación de las tres pantallas. </text:p>
        </text:list-item>
        <text:list-item>
          <text:p text:style-name="P19">El FOV. </text:p>
        </text:list-item>
        <text:list-item>
          <text:p text:style-name="P20">Cualquier otro ajuste de visualización. </text:p>
        </text:list-item>
      </text:list>
      <text:p text:style-name="Text_20_body">Después, cierra LMU.</text:p>
      <text:p text:style-name="Horizontal_20_Line"/>
      <text:h text:style-name="Heading_20_2" text:outline-level="2">7. Comprobar la frecuencia de actualización</text:h>
      <text:p text:style-name="Text_20_body">Ve a:</text:p>
      <text:p text:style-name="Text_20_body"><text:span text:style-name="Source_20_Text">/home/TU_USUARIO/.steam/steam/steamapps/common/Le Mans Ultimate/UserData/</text:span></text:p>
      <text:p text:style-name="Text_20_body">Abre <text:span text:style-name="Strong_20_Emphasis">Config_DX11.ini</text:span> y verifica que la frecuencia de actualización sea correcta.</text:p>
      <text:p text:style-name="Text_20_body">Si es necesario, ajústala para que coincida con la de tus monitores (144 Hz, 120 Hz, etc.) y guarda el archivo.</text:p>
      <text:p text:style-name="Horizontal_20_Line"/>
      <text:h text:style-name="Heading_20_2" text:outline-level="2">8. Comprobación final</text:h>
      <text:p text:style-name="Text_20_body">Utiliza siempre la siguiente secuencia de inicio.</text:p>
      <text:h text:style-name="Heading_20_3" text:outline-level="3">Inicio</text:h>
      <text:list text:style-name="L11">
        <text:list-item>
          <text:p text:style-name="P21">Inicia LMU desde Steam. </text:p>
        </text:list-item>
        <text:list-item>
          <text:p text:style-name="P22">Ejecuta el script de inicio. </text:p>
        </text:list-item>
      </text:list>
      <text:h text:style-name="Heading_20_3" text:outline-level="3">Cierre</text:h>
      <text:list text:style-name="L12">
        <text:list-item>
          <text:p text:style-name="P23">Cierra SimHubDash y CrewChief (el orden es indiferente). </text:p>
        </text:list-item>
        <text:list-item>
          <text:p text:style-name="P24">Cierra LMU. </text:p>
        </text:list-item>
      </text:list>
      <text:p text:style-name="Horizontal_20_Line"/>
      <text:h text:style-name="Heading_20_2" text:outline-level="2">9. No utilices Gamescope</text:h>
      <text:p text:style-name="Text_20_body">No utilices Gamescope con esta configuración.</text:p>
      <text:p text:style-name="Horizontal_20_Line"/>
      <text:h text:style-name="Heading_20_1" text:outline-level="1"><text:soft-page-break/>Opciones de lanzamiento de Steam</text:h>
      <text:h text:style-name="Heading_20_2" text:outline-level="2">Importante</text:h>
      <text:p text:style-name="Text_20_body">Para que todas las aplicaciones puedan comunicarse correctamente, <text:span text:style-name="Strong_20_Emphasis">no debe utilizarse Gamescope</text:span>.</text:p>
      <text:p text:style-name="Text_20_body">A continuación se muestra el comando de lanzamiento de Steam que funciona correctamente en mi equipo.</text:p>
      <text:p text:style-name="Text_20_body">Se incluye únicamente como ejemplo y puede que no sea la mejor opción para tu hardware:</text:p>
      <text:p text:style-name="Text_20_body">PROTON_USE_NTSYNC=1 PROTON_FSR4_UPGRADE=1 PROTON_ENABLE_HDR=1 PROTON_ENABLE_WAYLAND=1 RADV_PERFMODE=high DXVK_ASYNC=1 renice -n -10 -p $(pgrep -u $USER le_mans_ultimate) 2&gt;/dev/null; %command%</text:p>
      <text:p text:style-name="Text_20_body">Puedes utilizarlo como punto de partida o pedir a una IA que te recomiende las opciones de lanzamiento más adecuadas para tu hardware.</text:p>
      <text:p text:style-name="Text_20_body">Lo importante es que especifiques claramente que <text:span text:style-name="Strong_20_Emphasis">no quieres utilizar Gamescope</text:span>.</text:p>
      <text:p text:style-name="Text_20_body">Si necesitas más FPS, puedes instalar <text:span text:style-name="Strong_20_Emphasis">lsfg-vk</text:span>, aunque eso ya es otro tema.</text:p>
      <text:p text:style-name="P25"/>
      <text:h text:style-name="P26" text:outline-level="1">Agradecimientos</text:h>
      <text:p text:style-name="Text_20_body">Este manual ha sido posible gracias al excelente trabajo de <text:span text:style-name="Strong_20_Emphasis">srlemke</text:span> y sus guías sobre Le Mans Ultimate en Linux.</text:p>
      <text:p text:style-name="Text_20_body">La configuración de triple monitor sin Gamescope se basa en su archivo de configuración y en su guía original <text:span text:style-name="Emphasis">LMU Linux Triples</text:span>, adaptada para funcionar en Wayland y KDE Plasma.</text:p>
      <text:p text:style-name="Text_20_body">Guía original:<text:line-break/>https://gist.github.com/srlemke/a9a8273dc66230a3dc36d8bd425186fc</text:p>
      <text:p text:style-name="Text_20_body">Su colección completa de guías y scripts relacionados con SimHub, CrewChief y optimización en Linux puede encontrarse aquí:<text:line-break/><text:a xlink:type="simple" xlink:href="https://gist.github.com/srlemke?utm_source=chatgpt.com" office:target-frame-name="_new" xlink:show="replace" text:style-name="Internet_20_link" text:visited-style-name="Visited_20_Internet_20_Link">https://gist.github.com/srlemke</text:a></text:p>
      <text:p text:style-name="P25"/>
      <text:h text:style-name="P26" text:outline-level="1">¡DISFRUTA DE TU SIMULADOR!</text:h>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03T20:19:55.127984952</meta:creation-date>
    <dc:date>2026-07-03T20:25:33.812058775</dc:date>
    <meta:editing-duration>PT5M39S</meta:editing-duration>
    <meta:editing-cycles>1</meta:editing-cycles>
    <meta:document-statistic meta:table-count="0" meta:image-count="0" meta:object-count="0" meta:page-count="6" meta:paragraph-count="120" meta:word-count="1117" meta:character-count="7380" meta:non-whitespace-character-count="6384"/>
    <meta:generator>LibreOffice/26.2.4.2$Linux_X86_64 LibreOffice_project/df4f15f06f7b375c1d16aa35fba92d50b262cd01</meta:generator>
  </office:meta>
</office:document-meta>
</file>