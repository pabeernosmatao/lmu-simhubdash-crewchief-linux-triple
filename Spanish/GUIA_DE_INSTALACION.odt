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margin-top="0cm" fo:margin-bottom="0.247cm" style:contextual-spacing="false" fo:line-height="115%" fo:text-align="left" style:justify-single-word="false" style:writing-mode="lr-tb"/>
      <style:text-properties officeooo:paragraph-rsid="000d0ebb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Horizontal_20_Line">
      <style:paragraph-properties fo:margin-top="0cm" fo:margin-bottom="0.247cm" style:contextual-spacing="false" fo:line-height="115%"/>
    </style:style>
    <style:style style:name="P27" style:family="paragraph" style:parent-style-name="Heading_20_1">
      <style:paragraph-properties fo:margin-top="0cm" fo:margin-bottom="0.247cm" style:contextual-spacing="false" fo:line-height="115%"/>
    </style:style>
    <style:style style:name="T1" style:family="text">
      <style:text-properties officeooo:rsid="000d0ebb"/>
    </style:style>
    <style:style style:name="T2" style:family="text">
      <style:text-properties officeooo:rsid="000336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ía completa de instalación: SimHubDash + CrewChief para Le Mans Ultimate en Linux (CachyOS + KDE Plasma)</text:h>
      <text:p text:style-name="Text_20_body">Esta guía explica cómo instalar y configurar Le Mans Ultimate, SimHubDash y CrewChief en Linux utilizando Wayland, con una configuración de tres monitores de <text:span text:style-name="Strong_20_Emphasis">7680×1440 a 144 Hz</text:span>, sin utilizar Gamescope.</text:p>
      <text:p text:style-name="Text_20_body"><text:span text:style-name="Strong_20_Emphasis">Nota:</text:span> La resolución y la frecuencia de actualización de los monitores pueden adaptarse a la configuración de tu equipo.</text:p>
      <text:p text:style-name="Horizontal_20_Line"/>
      <text:h text:style-name="Heading_20_1" text:outline-level="1">Instalación de Le Mans Ultimate, SimHubDash y CrewChief</text:h>
      <text:h text:style-name="Heading_20_2" text:outline-level="2">1. Instalar Le Mans Ultimate</text:h>
      <text:p text:style-name="Text_20_body">Instala Le Mans Ultimate desde Steam y ejecútalo utilizando la versión de Proton recomendada para la versión actual del juego.</text:p>
      <text:p text:style-name="Text_20_body">Antes de continuar:</text:p>
      <text:list text:style-name="L1">
        <text:list-item>
          <text:p text:style-name="P1">Utiliza únicamente un monitor para la configuración inicial (puedes tener más monitores conectados, pero no intentes configurar la triple pantalla todavía). </text:p>
        </text:list-item>
        <text:list-item>
          <text:p text:style-name="P1">Configura el volante, los pedales, la asignación de botones y el resto de los controles. </text:p>
        </text:list-item>
        <text:list-item>
          <text:p text:style-name="P1">Cierra el simulador cuando hayas terminado de configurarlo. </text:p>
        </text:list-item>
        <text:list-item>
          <text:p text:style-name="P2">Deja las <text:span text:style-name="Strong_20_Emphasis">Opciones de lanzamiento de Steam</text:span> completamente vacías por ahora. </text:p>
        </text:list-item>
      </text:list>
      <text:p text:style-name="Horizontal_20_Line"/>
      <text:h text:style-name="Heading_20_2" text:outline-level="2">2. Descargar las últimas versiones</text:h>
      <text:p text:style-name="Text_20_body">Descarga las versiones más recientes de:</text:p>
      <text:list text:style-name="L2">
        <text:list-item>
          <text:p text:style-name="P3">SimHubDash </text:p>
        </text:list-item>
        <text:list-item>
          <text:p text:style-name="P4">CrewChief </text:p>
        </text:list-item>
      </text:list>
      <text:p text:style-name="Horizontal_20_Line"/>
      <text:h text:style-name="Heading_20_2" text:outline-level="2">3. Abrir una terminal</text:h>
      <text:p text:style-name="Text_20_body">Accede a la carpeta donde descargaste los instaladores.</text:p>
      <text:p text:style-name="Horizontal_20_Line"/>
      <text:h text:style-name="Heading_20_2" text:outline-level="2"><text:soft-page-break/>4. Instalar SimHubDash y CrewChief</text:h>
      <text:p text:style-name="Text_20_body">Ejecuta los comandos incluidos en <text:span text:style-name="Strong_20_Emphasis">Install_Simhubdash_and_Crewchief.txt</text:span>.</text:p>
      <text:p text:style-name="Text_20_body"><text:span text:style-name="Strong_20_Emphasis">Importante:</text:span> Actualiza la ruta y la versión de Proton, así como los nombres de los instaladores de SimHubDash y CrewChief, para que coincidan con las versiones que estés utilizando.</text:p>
      <text:p text:style-name="P5">- Crewchief: Después de la instalación, no lo ejecute<text:span text:style-name="T1">s</text:span> si el instalador lo solicita.</text:p>
      <text:p text:style-name="P5">- Simhubdash <text:span text:style-name="T2">desmarca</text:span> - Install .NET Runtime</text:p>
      <text:p text:style-name="P5"><text:s text:c="39"/>- Install USB Display Drivers</text:p>
      <text:p text:style-name="P5"><text:s text:c="39"/>- Install Visual C++ Redistributables <text:s text:c="5"/></text:p>
      <text:p text:style-name="P5"><text:s text:c="39"/>- Después de la instalación, no lo ejecute<text:span text:style-name="T1">s</text:span> si el instalador lo solicita.</text:p>
      <text:p text:style-name="Horizontal_20_Line"/>
      <text:h text:style-name="Heading_20_2" text:outline-level="2">5. Crear el script de inicio</text:h>
      <text:p text:style-name="Text_20_body">Crea un script llamado <text:span text:style-name="Strong_20_Emphasis">xxxx.sh</text:span> utilizando el contenido de <text:span text:style-name="Strong_20_Emphasis">Launch_Simhub_And_Crewchief.txt</text:span>.</text:p>
      <text:p text:style-name="Text_20_body">Guárdalo donde prefieras y dale permisos de ejecución.</text:p>
      <text:p text:style-name="Text_20_body">Recuerda actualizar la ruta de Proton si es necesario.</text:p>
      <text:p text:style-name="Horizontal_20_Line"/>
      <text:h text:style-name="Heading_20_2" text:outline-level="2">6. Iniciar SimHubDash y CrewChief</text:h>
      <text:p text:style-name="Text_20_body">Ejecuta <text:span text:style-name="Strong_20_Emphasis">xxxx.sh</text:span>.</text:p>
      <text:p text:style-name="Text_20_body">Las dos aplicaciones deberían iniciarse correctamente.</text:p>
      <text:p text:style-name="Text_20_body">Configura los <text:span text:style-name="Strong_20_Emphasis">plugins de telemetría</text:span> en cada una de ellas.</text:p>
      <text:p text:style-name="Text_20_body">Si alguna de las aplicaciones no detecta o no permite configurar la telemetría, ciérralas ambas.</text:p>
      <text:p text:style-name="Horizontal_20_Line"/>
      <text:h text:style-name="Heading_20_2" text:outline-level="2">6b. Si la telemetría sigue sin funcionar</text:h>
      <text:p text:style-name="Text_20_body">Con ambas aplicaciones cerradas:</text:p>
      <text:list text:style-name="L3">
        <text:list-item>
          <text:p text:style-name="P6">Inicia Le Mans Ultimate desde Steam. </text:p>
        </text:list-item>
        <text:list-item>
          <text:p text:style-name="P6">Cuando el simulador esté en funcionamiento, ejecuta <text:span text:style-name="Strong_20_Emphasis">xxxx.sh</text:span>. </text:p>
        </text:list-item>
        <text:list-item>
          <text:p text:style-name="P7">Configura de nuevo los <text:span text:style-name="Strong_20_Emphasis">plugins de telemetría</text:span> en SimHubDash y CrewChief. </text:p>
        </text:list-item>
      </text:list>
      <text:p text:style-name="Text_20_body">Una vez que la telemetría funcione correctamente, cierra todo siguiendo este orden:</text:p>
      <text:list text:style-name="L4">
        <text:list-item>
          <text:p text:style-name="P8">Cierra SimHubDash y CrewChief. </text:p>
        </text:list-item>
        <text:list-item>
          <text:p text:style-name="P9">Cierra Le Mans Ultimate. </text:p>
        </text:list-item>
      </text:list>
      <text:p text:style-name="Text_20_body"><text:span text:style-name="Strong_20_Emphasis">Nota:</text:span> La activación de la telemetría puede resultar algo inconsistente. En mi experiencia, normalmente funciona con el simulador cerrado (Paso 6), aunque en algunas ocasiones solo se <text:soft-page-break/>activa cuando LMU ya está en ejecución (Paso 6b). Si no funciona al primer intento, vuelve a intentarlo; tarde o temprano terminará conectando correctamente.</text:p>
      <text:p text:style-name="Horizontal_20_Line"/>
      <text:h text:style-name="Heading_20_2" text:outline-level="2">7. Permitir SimHubDash en el cortafuegos</text:h>
      <text:p text:style-name="Text_20_body">Para que SimHubDash pueda comunicarse con tablets y dispositivos móviles, abre el puerto <text:span text:style-name="Strong_20_Emphasis">TCP 8888</text:span> en el cortafuegos.</text:p>
      <text:p text:style-name="Text_20_body">En KDE Plasma, la configuración del cortafuegos está disponible directamente desde <text:span text:style-name="Strong_20_Emphasis">Configuración del sistema</text:span>.</text:p>
      <text:p text:style-name="Horizontal_20_Line"/>
      <text:h text:style-name="Heading_20_2" text:outline-level="2">8. Comprobar que todo funciona correctamente</text:h>
      <text:p text:style-name="Text_20_body">Procura iniciar y cerrar siempre las aplicaciones siguiendo el mismo orden.</text:p>
      <text:h text:style-name="Heading_20_3" text:outline-level="3">Inicio</text:h>
      <text:list text:style-name="L5">
        <text:list-item>
          <text:p text:style-name="P10">Inicia Le Mans Ultimate desde Steam. </text:p>
        </text:list-item>
        <text:list-item>
          <text:p text:style-name="P11">Ejecuta el script de inicio. </text:p>
        </text:list-item>
      </text:list>
      <text:h text:style-name="Heading_20_3" text:outline-level="3">Cierre</text:h>
      <text:list text:style-name="L6">
        <text:list-item>
          <text:p text:style-name="P12">Cierra SimHubDash y CrewChief (el orden entre ambas aplicaciones es indiferente). </text:p>
        </text:list-item>
        <text:list-item>
          <text:p text:style-name="P13">Cierra Le Mans Ultimate. </text:p>
        </text:list-item>
      </text:list>
      <text:p text:style-name="Horizontal_20_Line"/>
      <text:h text:style-name="Heading_20_2" text:outline-level="2">9. Usuarios con un solo monitor</text:h>
      <text:p text:style-name="Text_20_body">Si utilizas un único monitor, ya puedes pasar directamente a la sección <text:span text:style-name="Strong_20_Emphasis">Opciones de lanzamiento de Steam</text:span>.</text:p>
      <text:p text:style-name="Horizontal_20_Line"/>
      <text:h text:style-name="Heading_20_1" text:outline-level="1">Notas</text:h>
      <text:p text:style-name="Text_20_body">Según mi experiencia:</text:p>
      <text:list text:style-name="L7">
        <text:list-item>
          <text:p text:style-name="P14">CrewChief funciona correctamente, excepto los comandos de voz y la opción para que el programa se dirija a ti por tu nombre. </text:p>
        </text:list-item>
        <text:list-item>
          <text:p text:style-name="P14">SimHubDash funciona correctamente para dashboards, overlays, telemetría y el resto de pantallas de información. </text:p>
        </text:list-item>
        <text:list-item>
          <text:p text:style-name="P15">El sistema háptico <text:span text:style-name="Strong_20_Emphasis">Next Level Racing HF8</text:span> también funciona, pero debe configurarse como un dispositivo de salida de audio dentro de <text:span text:style-name="Strong_20_Emphasis">ShakeIt Bass Shakers</text:span>. No he conseguido hacerlo funcionar mediante USB.</text:p>
        </text:list-item>
      </text:list>
      <text:p text:style-name="Standard"/>
      <text:p text:style-name="Standard"/>
      <text:p text:style-name="Standard"><text:soft-page-break/></text:p>
      <text:h text:style-name="Heading_20_1" text:outline-level="1">Configuración para tres monitores (Wayland, sin Gamescope)</text:h>
      <text:h text:style-name="Heading_20_2" text:outline-level="2">1. Descargar Config_DX11.txt</text:h>
      <text:p text:style-name="Horizontal_20_Line"/>
      <text:h text:style-name="Heading_20_2" text:outline-level="2">2. Editar el archivo de configuración</text:h>
      <text:p text:style-name="Text_20_body">Ve a:</text:p>
      <text:p text:style-name="Text_20_body"><text:span text:style-name="Source_20_Text">/home/TU_USUARIO/.steam/steam/steamapps/common/Le Mans Ultimate/UserData/</text:span></text:p>
      <text:p text:style-name="Text_20_body">Abre <text:span text:style-name="Strong_20_Emphasis">Config_DX11.ini</text:span>, sustituye todo su contenido por el de <text:span text:style-name="Strong_20_Emphasis">Config_DX11.txt</text:span> y guarda el archivo.</text:p>
      <text:p text:style-name="Text_20_body">Si tu configuración no es de <text:span text:style-name="Strong_20_Emphasis">7680×1440</text:span>, modifica únicamente los valores de resolución.</text:p>
      <text:p text:style-name="Text_20_body">Por ahora, deja el resto de opciones sin cambios.</text:p>
      <text:p text:style-name="Horizontal_20_Line"/>
      <text:h text:style-name="Heading_20_2" text:outline-level="2">3. Configurar LMU</text:h>
      <text:p text:style-name="Text_20_body">Inicia Le Mans Ultimate.</text:p>
      <text:p text:style-name="Text_20_body">Configura únicamente:</text:p>
      <text:list text:style-name="L8">
        <text:list-item>
          <text:p text:style-name="P16">Resolución de pantalla. </text:p>
        </text:list-item>
        <text:list-item>
          <text:p text:style-name="P17">Activar <text:span text:style-name="Strong_20_Emphasis">Multiview</text:span>. </text:p>
        </text:list-item>
      </text:list>
      <text:p text:style-name="Text_20_body">Reinicia el simulador.</text:p>
      <text:p text:style-name="Horizontal_20_Line"/>
      <text:h text:style-name="Heading_20_2" text:outline-level="2">4. Comprobar la imagen</text:h>
      <text:p text:style-name="Text_20_body">Si LMU se extiende correctamente por los tres monitores, continúa con el <text:span text:style-name="Strong_20_Emphasis">Paso 6</text:span>.</text:p>
      <text:p text:style-name="Horizontal_20_Line"/>
      <text:h text:style-name="Heading_20_2" text:outline-level="2">4b. Si LMU solo ocupa dos monitores</text:h>
      <text:p text:style-name="Text_20_body">Continúa con el <text:span text:style-name="Strong_20_Emphasis">Paso 5</text:span>.</text:p>
      <text:p text:style-name="Horizontal_20_Line"/>
      <text:h text:style-name="Heading_20_2" text:outline-level="2">5. Crear una regla de ventana en KDE Plasma</text:h>
      <text:p text:style-name="Text_20_body">Con LMU en funcionamiento:</text:p>
      <text:list text:style-name="L9">
        <text:list-item>
          <text:p text:style-name="P18"><text:soft-page-break/>Abre <text:span text:style-name="Strong_20_Emphasis">Configuración del sistema → Gestión de ventanas → Reglas de ventanas</text:span>. </text:p>
        </text:list-item>
        <text:list-item>
          <text:p text:style-name="P18">Crea una nueva regla. </text:p>
        </text:list-item>
        <text:list-item>
          <text:p text:style-name="P18">Selecciona la ventana de LMU. </text:p>
        </text:list-item>
        <text:list-item>
          <text:p text:style-name="P19">Configúrala utilizando los parámetros mostrados en la imagen <text:span text:style-name="Strong_20_Emphasis">window_rule.png</text:span>. </text:p>
        </text:list-item>
      </text:list>
      <text:p text:style-name="Text_20_body"><text:span text:style-name="Strong_20_Emphasis">Nota:</text:span> La posición de la ventana puede variar respecto al ejemplo. En mi caso está configurada en <text:span text:style-name="Strong_20_Emphasis">0,1080</text:span> porque tengo un cuarto monitor situado encima del conjunto de tres pantallas. Según tu configuración, el valor puede ser <text:span text:style-name="Strong_20_Emphasis">0,0</text:span> u otro distinto.</text:p>
      <text:p text:style-name="Text_20_body">Aplica los cambios.</text:p>
      <text:p text:style-name="Text_20_body">Cierra LMU y vuelve a iniciarlo.</text:p>
      <text:p text:style-name="Text_20_body">Ahora debería extenderse correctamente por los tres monitores.</text:p>
      <text:p text:style-name="Horizontal_20_Line"/>
      <text:h text:style-name="Heading_20_2" text:outline-level="2">6. Ajustar la vista dentro del juego</text:h>
      <text:p text:style-name="Text_20_body">Entra en una sesión y ajusta:</text:p>
      <text:list text:style-name="L10">
        <text:list-item>
          <text:p text:style-name="P20">La alineación de las tres pantallas. </text:p>
        </text:list-item>
        <text:list-item>
          <text:p text:style-name="P20">El FOV. </text:p>
        </text:list-item>
        <text:list-item>
          <text:p text:style-name="P21">Cualquier otro ajuste de visualización. </text:p>
        </text:list-item>
      </text:list>
      <text:p text:style-name="Text_20_body">Después, cierra LMU.</text:p>
      <text:p text:style-name="Horizontal_20_Line"/>
      <text:h text:style-name="Heading_20_2" text:outline-level="2">7. Comprobar la frecuencia de actualización</text:h>
      <text:p text:style-name="Text_20_body">Ve a:</text:p>
      <text:p text:style-name="Text_20_body"><text:span text:style-name="Source_20_Text">/home/TU_USUARIO/.steam/steam/steamapps/common/Le Mans Ultimate/UserData/</text:span></text:p>
      <text:p text:style-name="Text_20_body">Abre <text:span text:style-name="Strong_20_Emphasis">Config_DX11.ini</text:span> y verifica que la frecuencia de actualización sea correcta.</text:p>
      <text:p text:style-name="Text_20_body">Si es necesario, ajústala para que coincida con la de tus monitores (144 Hz, 120 Hz, etc.) y guarda el archivo.</text:p>
      <text:p text:style-name="Horizontal_20_Line"/>
      <text:h text:style-name="Heading_20_2" text:outline-level="2">8. Comprobación final</text:h>
      <text:p text:style-name="Text_20_body">Utiliza siempre la siguiente secuencia de inicio.</text:p>
      <text:h text:style-name="Heading_20_3" text:outline-level="3">Inicio</text:h>
      <text:list text:style-name="L11">
        <text:list-item>
          <text:p text:style-name="P22">Inicia LMU desde Steam. </text:p>
        </text:list-item>
        <text:list-item>
          <text:p text:style-name="P23">Ejecuta el script de inicio. </text:p>
        </text:list-item>
      </text:list>
      <text:h text:style-name="Heading_20_3" text:outline-level="3">Cierre</text:h>
      <text:list text:style-name="L12">
        <text:list-item>
          <text:p text:style-name="P24">Cierra SimHubDash y CrewChief (el orden es indiferente). </text:p>
        </text:list-item>
        <text:list-item>
          <text:p text:style-name="P25"><text:soft-page-break/>Cierra LMU. </text:p>
        </text:list-item>
      </text:list>
      <text:p text:style-name="Horizontal_20_Line"/>
      <text:h text:style-name="Heading_20_2" text:outline-level="2">9. No utilices Gamescope</text:h>
      <text:p text:style-name="Text_20_body">No utilices Gamescope con esta configuración.</text:p>
      <text:p text:style-name="Horizontal_20_Line"/>
      <text:h text:style-name="Heading_20_1" text:outline-level="1">Opciones de lanzamiento de Steam</text:h>
      <text:h text:style-name="Heading_20_2" text:outline-level="2">Importante</text:h>
      <text:p text:style-name="Text_20_body">Para que todas las aplicaciones puedan comunicarse correctamente, <text:span text:style-name="Strong_20_Emphasis">no debe utilizarse Gamescope</text:span>.</text:p>
      <text:p text:style-name="Text_20_body">A continuación se muestra el comando de lanzamiento de Steam que funciona correctamente en mi equipo.</text:p>
      <text:p text:style-name="Text_20_body">Se incluye únicamente como ejemplo y puede que no sea la mejor opción para tu hardware:</text:p>
      <text:p text:style-name="Text_20_body">PROTON_USE_NTSYNC=1 PROTON_FSR4_UPGRADE=1 PROTON_ENABLE_HDR=1 PROTON_ENABLE_WAYLAND=1 RADV_PERFMODE=high DXVK_ASYNC=1 renice -n -10 -p $(pgrep -u $USER le_mans_ultimate) 2&gt;/dev/null; %command%</text:p>
      <text:p text:style-name="Text_20_body">Puedes utilizarlo como punto de partida o pedir a una IA que te recomiende las opciones de lanzamiento más adecuadas para tu hardware.</text:p>
      <text:p text:style-name="Text_20_body">Lo importante es que especifiques claramente que <text:span text:style-name="Strong_20_Emphasis">no quieres utilizar Gamescope</text:span>.</text:p>
      <text:p text:style-name="Text_20_body">Si necesitas más FPS, puedes instalar <text:span text:style-name="Strong_20_Emphasis">lsfg-vk</text:span>, aunque eso ya es otro tema.</text:p>
      <text:p text:style-name="P26"/>
      <text:h text:style-name="P27" text:outline-level="1">Agradecimientos</text:h>
      <text:p text:style-name="Text_20_body">Este manual ha sido posible gracias al excelente trabajo de <text:span text:style-name="Strong_20_Emphasis">srlemke</text:span> y sus guías sobre Le Mans Ultimate en Linux.</text:p>
      <text:p text:style-name="Text_20_body">La configuración de triple monitor sin Gamescope se basa en su archivo de configuración y en su guía original <text:span text:style-name="Emphasis">LMU Linux Triples</text:span>, adaptada para funcionar en Wayland y KDE Plasma.</text:p>
      <text:p text:style-name="Text_20_body">Guía original:<text:line-break/>https://gist.github.com/srlemke/a9a8273dc66230a3dc36d8bd425186fc</text:p>
      <text:p text:style-name="Text_20_body">Su colección completa de guías y scripts relacionados con SimHub, CrewChief y optimización en Linux puede encontrarse aquí:<text:line-break/><text:a xlink:type="simple" xlink:href="https://gist.github.com/srlemke?utm_source=chatgpt.com" office:target-frame-name="_new" xlink:show="replace" text:style-name="Internet_20_link" text:visited-style-name="Visited_20_Internet_20_Link">https://gist.github.com/srlemke</text:a></text:p>
      <text:p text:style-name="P26"/>
      <text:h text:style-name="P27" text:outline-level="1">¡DISFRUTA DE TU SIMULADOR!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3T20:19:55.127984952</meta:creation-date>
    <dc:date>2026-07-04T01:44:13.185274781</dc:date>
    <meta:editing-duration>PT6M22S</meta:editing-duration>
    <meta:editing-cycles>2</meta:editing-cycles>
    <meta:generator>LibreOffice/26.2.4.2$Linux_X86_64 LibreOffice_project/df4f15f06f7b375c1d16aa35fba92d50b262cd01</meta:generator>
    <meta:document-statistic meta:table-count="0" meta:image-count="0" meta:object-count="0" meta:page-count="6" meta:paragraph-count="125" meta:word-count="1161" meta:character-count="7770" meta:non-whitespace-character-count="6612"/>
  </office:meta>
</office:document-meta>
</file>