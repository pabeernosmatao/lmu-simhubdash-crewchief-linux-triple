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Horizontal_20_Line">
      <style:paragraph-properties fo:margin-top="0cm" fo:margin-bottom="0.247cm" style:contextual-spacing="false" fo:line-height="115%"/>
    </style:style>
    <style:style style:name="P26" style:family="paragraph" style:parent-style-name="Heading_20_1">
      <style:paragraph-properties fo:margin-top="0cm" fo:margin-bottom="0.247cm" style:contextual-spacing="false" fo:line-height="11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ing Le Mans Ultimate, SimHubDash and CrewChief</text:h>
      <text:h text:style-name="Heading_20_2" text:outline-level="2">1. Install Le Mans Ultimate</text:h>
      <text:p text:style-name="Text_20_body">Install Le Mans Ultimate via Steam and launch it using the Proton version recommended for the current game release.</text:p>
      <text:p text:style-name="Text_20_body">Before continuing:</text:p>
      <text:list text:style-name="L1">
        <text:list-item>
          <text:p text:style-name="P1">Use only one monitor for the initial setup (you may have multiple monitors connected, but do not attempt triple-screen configuration yet). </text:p>
        </text:list-item>
        <text:list-item>
          <text:p text:style-name="P1">Configure your steering wheel, pedals, button mappings, and any other controls. </text:p>
        </text:list-item>
        <text:list-item>
          <text:p text:style-name="P1">Close the simulator once everything is configured. </text:p>
        </text:list-item>
        <text:list-item>
          <text:p text:style-name="P2">Leave Steam Launch Options completely empty for now. </text:p>
        </text:list-item>
      </text:list>
      <text:p text:style-name="Horizontal_20_Line"/>
      <text:h text:style-name="Heading_20_2" text:outline-level="2">2. Download the latest versions</text:h>
      <text:p text:style-name="Text_20_body">Download the latest releases of:</text:p>
      <text:list text:style-name="L2">
        <text:list-item>
          <text:p text:style-name="P3">SimHubDash </text:p>
        </text:list-item>
        <text:list-item>
          <text:p text:style-name="P4">CrewChief </text:p>
        </text:list-item>
      </text:list>
      <text:p text:style-name="Horizontal_20_Line"/>
      <text:h text:style-name="Heading_20_2" text:outline-level="2">3. Open a terminal</text:h>
      <text:p text:style-name="Text_20_body">Navigate to the folder where you downloaded the installers.</text:p>
      <text:p text:style-name="Horizontal_20_Line"/>
      <text:h text:style-name="Heading_20_2" text:outline-level="2">4. Install SimHubDash and CrewChief</text:h>
      <text:p text:style-name="Text_20_body">Run the commands contained in <text:span text:style-name="Strong_20_Emphasis">Install_Simhubdash_and_Crewchief.txt</text:span>.</text:p>
      <text:p text:style-name="Text_20_body"><text:span text:style-name="Strong_20_Emphasis">Important:</text:span> Update the Proton path/version and the installer filenames for SimHubDash and CrewChief to match the versions you are using.</text:p>
      <text:p text:style-name="Horizontal_20_Line"/>
      <text:h text:style-name="Heading_20_2" text:outline-level="2">5. Create the launch script</text:h>
      <text:p text:style-name="Text_20_body">Create a script named <text:span text:style-name="Strong_20_Emphasis">xxxx.sh</text:span> using the contents of <text:span text:style-name="Strong_20_Emphasis">Launch_Simhub_And_Crewchief.txt</text:span>.</text:p>
      <text:p text:style-name="Text_20_body">Save it wherever you prefer and make it executable.</text:p>
      <text:p text:style-name="Text_20_body">Remember to update the Proton path if necessary.</text:p>
      <text:p text:style-name="Horizontal_20_Line"/>
      <text:h text:style-name="Heading_20_2" text:outline-level="2"><text:soft-page-break/>6. Launch SimHubDash and CrewChief</text:h>
      <text:p text:style-name="Text_20_body">Run <text:span text:style-name="Strong_20_Emphasis">xxxx.sh</text:span>.</text:p>
      <text:p text:style-name="Text_20_body">Both applications should start correctly.</text:p>
      <text:p text:style-name="Text_20_body">Configure the <text:span text:style-name="Strong_20_Emphasis">telemetry plugins</text:span> in each application.</text:p>
      <text:p text:style-name="Text_20_body">If either application fails to detect or configure telemetry, close both programs.</text:p>
      <text:p text:style-name="Horizontal_20_Line"/>
      <text:h text:style-name="Heading_20_2" text:outline-level="2">6b. If telemetry still does not work</text:h>
      <text:p text:style-name="Text_20_body">With both applications closed:</text:p>
      <text:list text:style-name="L3">
        <text:list-item>
          <text:p text:style-name="P5">Launch Le Mans Ultimate from Steam. </text:p>
        </text:list-item>
        <text:list-item>
          <text:p text:style-name="P5">Once the simulator is running, execute <text:span text:style-name="Strong_20_Emphasis">xxxx.sh</text:span>. </text:p>
        </text:list-item>
        <text:list-item>
          <text:p text:style-name="P6">Reconfigure the <text:span text:style-name="Strong_20_Emphasis">telemetry plugins</text:span> in SimHubDash and CrewChief. </text:p>
        </text:list-item>
      </text:list>
      <text:p text:style-name="Text_20_body">Once telemetry is working correctly, close everything in this order:</text:p>
      <text:list text:style-name="L4">
        <text:list-item>
          <text:p text:style-name="P7">Close SimHubDash and CrewChief. </text:p>
        </text:list-item>
        <text:list-item>
          <text:p text:style-name="P8">Close Le Mans Ultimate. </text:p>
        </text:list-item>
      </text:list>
      <text:p text:style-name="Text_20_body"><text:span text:style-name="Strong_20_Emphasis">Note:</text:span> Telemetry activation can be somewhat inconsistent. In my experience, it usually works with the simulator closed (Step 6), but sometimes it only works when LMU is already running (Step 6b). If it does not work on the first try, keep trying—it will eventually connect correctly.</text:p>
      <text:p text:style-name="Horizontal_20_Line"/>
      <text:h text:style-name="Heading_20_2" text:outline-level="2">7. Allow SimHubDash through the firewall</text:h>
      <text:p text:style-name="Text_20_body">To allow SimHubDash to communicate with tablets and mobile devices, open <text:span text:style-name="Strong_20_Emphasis">TCP port 8888</text:span> in your firewall.</text:p>
      <text:p text:style-name="Text_20_body">On KDE Plasma, firewall settings are available directly in <text:span text:style-name="Strong_20_Emphasis">System Settings</text:span>.</text:p>
      <text:p text:style-name="Horizontal_20_Line"/>
      <text:h text:style-name="Heading_20_2" text:outline-level="2">8. Verify everything is working correctly</text:h>
      <text:p text:style-name="Text_20_body">Always launch and close applications in the same order.</text:p>
      <text:h text:style-name="Heading_20_3" text:outline-level="3">Startup</text:h>
      <text:list text:style-name="L5">
        <text:list-item>
          <text:p text:style-name="P9">Launch Le Mans Ultimate from Steam. </text:p>
        </text:list-item>
        <text:list-item>
          <text:p text:style-name="P10">Run the launch script. </text:p>
        </text:list-item>
      </text:list>
      <text:h text:style-name="Heading_20_3" text:outline-level="3">Shutdown</text:h>
      <text:list text:style-name="L6">
        <text:list-item>
          <text:p text:style-name="P11">Close SimHubDash and CrewChief (either order is fine). </text:p>
        </text:list-item>
        <text:list-item>
          <text:p text:style-name="P12">Close Le Mans Ultimate. </text:p>
        </text:list-item>
      </text:list>
      <text:p text:style-name="Horizontal_20_Line"/>
      <text:h text:style-name="Heading_20_2" text:outline-level="2"><text:soft-page-break/>9. Single-monitor users</text:h>
      <text:p text:style-name="Text_20_body">If you only use one monitor, you can skip directly to the <text:span text:style-name="Strong_20_Emphasis">Steam Launch Options</text:span> section.</text:p>
      <text:p text:style-name="Horizontal_20_Line"/>
      <text:h text:style-name="Heading_20_1" text:outline-level="1">Notes</text:h>
      <text:p text:style-name="Text_20_body">In my experience:</text:p>
      <text:list text:style-name="L7">
        <text:list-item>
          <text:p text:style-name="P13">CrewChief works correctly, except for voice commands and the option to address you by name. </text:p>
        </text:list-item>
        <text:list-item>
          <text:p text:style-name="P13">SimHubDash works correctly for dashboards, overlays, telemetry, and other display elements. </text:p>
        </text:list-item>
        <text:list-item>
          <text:p text:style-name="P14">The <text:span text:style-name="Strong_20_Emphasis">Next Level Racing HF8 haptic system</text:span> also works, but must be configured as an audio output device inside <text:span text:style-name="Strong_20_Emphasis">ShakeIt Bass Shakers</text:span>. I have not been able to get it working via USB. </text:p>
        </text:list-item>
      </text:list>
      <text:p text:style-name="Horizontal_20_Line"/>
      <text:h text:style-name="Heading_20_1" text:outline-level="1">Triple Monitor Configuration (Wayland, No Gamescope)</text:h>
      <text:h text:style-name="Heading_20_2" text:outline-level="2">1. Download Config_DX11.txt</text:h>
      <text:p text:style-name="Horizontal_20_Line"/>
      <text:h text:style-name="Heading_20_2" text:outline-level="2">2. Edit the configuration file</text:h>
      <text:p text:style-name="Text_20_body">Go to:</text:p>
      <text:p text:style-name="Text_20_body"><text:span text:style-name="Source_20_Text">/home/YOUR_USER/.steam/steam/steamapps/common/Le Mans Ultimate/UserData/</text:span></text:p>
      <text:p text:style-name="Text_20_body">Open <text:span text:style-name="Strong_20_Emphasis">Config_DX11.ini</text:span>, replace its entire content with <text:span text:style-name="Strong_20_Emphasis">Config_DX11.txt</text:span>, and save the file.</text:p>
      <text:p text:style-name="Text_20_body">If your setup is not <text:span text:style-name="Strong_20_Emphasis">7680×1440</text:span>, only modify the resolution values.</text:p>
      <text:p text:style-name="Text_20_body">Leave everything else unchanged for now.</text:p>
      <text:p text:style-name="Horizontal_20_Line"/>
      <text:h text:style-name="Heading_20_2" text:outline-level="2">3. Configure LMU</text:h>
      <text:p text:style-name="Text_20_body">Launch Le Mans Ultimate.</text:p>
      <text:p text:style-name="Text_20_body">Configure only:</text:p>
      <text:list text:style-name="L8">
        <text:list-item>
          <text:p text:style-name="P15">Screen resolution </text:p>
        </text:list-item>
        <text:list-item>
          <text:p text:style-name="P16">Enable <text:span text:style-name="Strong_20_Emphasis">Multiview</text:span> </text:p>
        </text:list-item>
      </text:list>
      <text:p text:style-name="Text_20_body">Restart the simulator.</text:p>
      <text:p text:style-name="Horizontal_20_Line"><text:soft-page-break/></text:p>
      <text:h text:style-name="Heading_20_2" text:outline-level="2">4. Check display output</text:h>
      <text:p text:style-name="Text_20_body">If LMU correctly spans all three monitors, continue to <text:span text:style-name="Strong_20_Emphasis">Step 6</text:span>.</text:p>
      <text:p text:style-name="Horizontal_20_Line"/>
      <text:h text:style-name="Heading_20_2" text:outline-level="2">4b. If LMU only spans two monitors</text:h>
      <text:p text:style-name="Text_20_body">Continue to <text:span text:style-name="Strong_20_Emphasis">Step 5</text:span>.</text:p>
      <text:p text:style-name="Horizontal_20_Line"/>
      <text:h text:style-name="Heading_20_2" text:outline-level="2">5. Create a KDE Plasma window rule</text:h>
      <text:p text:style-name="Text_20_body">While LMU is running:</text:p>
      <text:list text:style-name="L9">
        <text:list-item>
          <text:p text:style-name="P17">Open <text:span text:style-name="Strong_20_Emphasis">System Settings → Window Management → Window Rules</text:span> </text:p>
        </text:list-item>
        <text:list-item>
          <text:p text:style-name="P17">Create a new rule </text:p>
        </text:list-item>
        <text:list-item>
          <text:p text:style-name="P17">Select the LMU window </text:p>
        </text:list-item>
        <text:list-item>
          <text:p text:style-name="P18">Configure it using the settings shown in <text:span text:style-name="Strong_20_Emphasis">window_rule.png</text:span> </text:p>
        </text:list-item>
      </text:list>
      <text:p text:style-name="Text_20_body"><text:span text:style-name="Strong_20_Emphasis">Note:</text:span> Window position may differ from the example. In my setup it is <text:span text:style-name="Strong_20_Emphasis">0,1080</text:span> because I use a fourth monitor above the triple-screen setup. Depending on your layout, it may be <text:span text:style-name="Strong_20_Emphasis">0,0</text:span> or something different.</text:p>
      <text:p text:style-name="Text_20_body">Apply changes.</text:p>
      <text:p text:style-name="Text_20_body">Close LMU and launch it again.</text:p>
      <text:p text:style-name="Text_20_body">It should now correctly span all three displays.</text:p>
      <text:p text:style-name="Horizontal_20_Line"/>
      <text:h text:style-name="Heading_20_2" text:outline-level="2">6. Adjust in-game view</text:h>
      <text:p text:style-name="Text_20_body">Enter a session and adjust:</text:p>
      <text:list text:style-name="L10">
        <text:list-item>
          <text:p text:style-name="P19">Triple-screen alignment </text:p>
        </text:list-item>
        <text:list-item>
          <text:p text:style-name="P19">FOV </text:p>
        </text:list-item>
        <text:list-item>
          <text:p text:style-name="P20">Any other display settings </text:p>
        </text:list-item>
      </text:list>
      <text:p text:style-name="Text_20_body">Then close LMU.</text:p>
      <text:p text:style-name="Horizontal_20_Line"/>
      <text:h text:style-name="Heading_20_2" text:outline-level="2">7. Check refresh rate</text:h>
      <text:p text:style-name="Text_20_body">Go to:</text:p>
      <text:p text:style-name="Text_20_body"><text:span text:style-name="Source_20_Text">/home/YOUR_USER/.steam/steam/steamapps/common/Le Mans Ultimate/UserData/</text:span></text:p>
      <text:p text:style-name="Text_20_body">Open <text:span text:style-name="Strong_20_Emphasis">Config_DX11.ini</text:span> and verify the refresh rate is correct.</text:p>
      <text:p text:style-name="Text_20_body"><text:soft-page-break/>If needed, adjust it to match your monitors (144 Hz, 120 Hz, etc.) and save the file.</text:p>
      <text:p text:style-name="Horizontal_20_Line"/>
      <text:h text:style-name="Heading_20_2" text:outline-level="2">8. Final verification</text:h>
      <text:p text:style-name="Text_20_body">Always use this startup sequence.</text:p>
      <text:h text:style-name="Heading_20_3" text:outline-level="3">Startup</text:h>
      <text:list text:style-name="L11">
        <text:list-item>
          <text:p text:style-name="P21">Launch LMU from Steam </text:p>
        </text:list-item>
        <text:list-item>
          <text:p text:style-name="P22">Run the launch script </text:p>
        </text:list-item>
      </text:list>
      <text:h text:style-name="Heading_20_3" text:outline-level="3">Shutdown</text:h>
      <text:list text:style-name="L12">
        <text:list-item>
          <text:p text:style-name="P23">Close SimHubDash and CrewChief (either order) </text:p>
        </text:list-item>
        <text:list-item>
          <text:p text:style-name="P24">Close LMU </text:p>
        </text:list-item>
      </text:list>
      <text:p text:style-name="Horizontal_20_Line"/>
      <text:h text:style-name="Heading_20_2" text:outline-level="2">9. Do not use Gamescope</text:h>
      <text:p text:style-name="Text_20_body">Do not use Gamescope with this setup.</text:p>
      <text:p text:style-name="Horizontal_20_Line"/>
      <text:h text:style-name="Heading_20_1" text:outline-level="1">Steam Launch Options</text:h>
      <text:h text:style-name="Heading_20_2" text:outline-level="2">Important</text:h>
      <text:p text:style-name="Text_20_body">To ensure proper communication between all applications, <text:span text:style-name="Strong_20_Emphasis">Gamescope must not be used</text:span>.</text:p>
      <text:p text:style-name="Text_20_body">Below is a Steam launch command that works on my system.</text:p>
      <text:p text:style-name="Text_20_body">It is provided as an example and may not be optimal for your hardware:</text:p>
      <text:p text:style-name="Text_20_body"/>
      <text:p text:style-name="Text_20_body">PROTON_USE_NTSYNC=1 PROTON_FSR4_UPGRADE=1 PROTON_ENABLE_HDR=1 PROTON_ENABLE_WAYLAND=1 RADV_PERFMODE=high DXVK_ASYNC=1 renice -n -10 -p $(pgrep -u $USER le_mans_ultimate) 2&gt;/dev/null; %command%</text:p>
      <text:p text:style-name="Text_20_body"/>
      <text:p text:style-name="Text_20_body">You can use it as a starting point or ask for a hardware-specific configuration.</text:p>
      <text:p text:style-name="Text_20_body">Just make sure you explicitly avoid using Gamescope.</text:p>
      <text:p text:style-name="Text_20_body">If you need more FPS, you can install <text:span text:style-name="Strong_20_Emphasis">lsfg-vk</text:span>, but that is outside the scope of this guide.</text:p>
      <text:p text:style-name="P25"/>
      <text:h text:style-name="P26" text:outline-level="1"><text:soft-page-break/>Acknowledgements</text:h>
      <text:p text:style-name="Text_20_body">This guide was made possible thanks to the excellent work of <text:span text:style-name="Strong_20_Emphasis">srlemke</text:span> and their Linux guides for Le Mans Ultimate.</text:p>
      <text:p text:style-name="Text_20_body">The triple-monitor configuration without Gamescope is based on their original <text:span text:style-name="Emphasis">LMU Linux Triples</text:span> setup, adapted for Wayland and KDE Plasma.</text:p>
      <text:p text:style-name="Text_20_body">Original guide:<text:line-break/>https://gist.github.com/srlemke/a9a8273dc66230a3dc36d8bd425186fc</text:p>
      <text:p text:style-name="Text_20_body">Full collection of related Linux sim racing guides and scripts:<text:line-break/><text:a xlink:type="simple" xlink:href="https://gist.github.com/srlemke?utm_source=chatgpt.com" office:target-frame-name="_new" xlink:show="replace" text:style-name="Internet_20_link" text:visited-style-name="Visited_20_Internet_20_Link">https://gist.github.com/srlemke</text:a></text:p>
      <text:p text:style-name="P25"/>
      <text:h text:style-name="P26" text:outline-level="1">ENJOY YOUR SIMULATOR!</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3T20:25:55.213787076</meta:creation-date>
    <dc:date>2026-07-03T20:27:31.929490767</dc:date>
    <meta:editing-duration>PT1M37S</meta:editing-duration>
    <meta:editing-cycles>1</meta:editing-cycles>
    <meta:document-statistic meta:table-count="0" meta:image-count="0" meta:object-count="0" meta:page-count="6" meta:paragraph-count="117" meta:word-count="906" meta:character-count="5832" meta:non-whitespace-character-count="5044"/>
    <meta:generator>LibreOffice/26.2.4.2$Linux_X86_64 LibreOffice_project/df4f15f06f7b375c1d16aa35fba92d50b262cd01</meta:generator>
  </office:meta>
</office:document-meta>
</file>